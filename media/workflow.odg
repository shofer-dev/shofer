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D0F18F78.png" manifest:media-type="image/png"/>
  <manifest:file-entry manifest:full-path="Pictures/10000000000000E1000000E16E9F18AB.png" manifest:media-type="image/png"/>
  <manifest:file-entry manifest:full-path="Pictures/10000000000000E1000000E1A5C29C1B.png" manifest:media-type="image/png"/>
  <manifest:file-entry manifest:full-path="Pictures/100000000000009400000094784011FC.png" manifest:media-type="image/png"/>
  <manifest:file-entry manifest:full-path="Pictures/100000000000009400000094398B090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aca6" draw:textarea-horizontal-align="justify" draw:textarea-vertical-align="middle" draw:auto-grow-height="false" fo:min-height="2.29cm" fo:min-width="4.263cm" style:writing-mode="lr-tb" loext:decorative="false"/>
      <style:paragraph-properties style:writing-mode="lr-tb"/>
    </style:style>
    <style:style style:name="gr2" style:family="graphic" style:parent-style-name="standard">
      <style:graphic-properties svg:stroke-linecap="butt" draw:fill-color="#d4ea6b" draw:textarea-horizontal-align="justify" draw:textarea-vertical-align="middle" draw:auto-grow-height="false" fo:min-height="2.29cm" fo:min-width="4.263cm" draw:shadow="hidden" draw:shadow-opacity="48%" loext:glow-radius="0cm" loext:glow-color="#ffbf00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d4ea6b" draw:opacity="100%" draw:textarea-horizontal-align="justify" draw:textarea-vertical-align="middle" draw:auto-grow-height="false" fo:min-height="2.29cm" fo:min-width="4.263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2.29cm" fo:min-width="4.263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 loext:decorative="false"/>
    </style:style>
    <style:style style:name="gr6" style:family="graphic" style:parent-style-name="standard">
      <style:graphic-properties draw:stroke="none" draw:fill="none" fo:min-height="1.111cm" loext:decorative="false"/>
      <style:paragraph-properties style:writing-mode="lr-tb"/>
    </style:style>
    <style:style style:name="gr7" style:family="graphic" style:parent-style-name="objectwithoutfill">
      <style:graphic-properties svg:stroke-width="0.159cm" draw:marker-start="Arrowheads_20_4" draw:marker-start-width="0.438cm" draw:marker-end="Arrowheads_20_4" draw:marker-end-width="0.538cm" draw:fill="none" draw:textarea-vertical-align="middle" fo:padding-top="0.204cm" fo:padding-bottom="0.204cm" fo:padding-left="0.329cm" fo:padding-right="0.329cm" loext:decorative="false"/>
    </style:style>
    <style:style style:name="gr8" style:family="graphic" style:parent-style-name="objectwithoutfill">
      <style:graphic-properties svg:stroke-width="0.159cm" draw:marker-start-width="0.438cm" draw:marker-end="Arrowheads_20_2" draw:marker-end-width="0.538cm" draw:fill="none" draw:textarea-vertical-align="middle" fo:padding-top="0.204cm" fo:padding-bottom="0.204cm" fo:padding-left="0.329cm" fo:padding-right="0.329cm" loext:decorative="false"/>
    </style:style>
    <style:style style:name="gr9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1.418cm" fo:min-width="1.803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465cm" fo:min-width="0.215cm" style:writing-mode="lr-tb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draw:fill="none" fo:min-height="1.666cm" loext:decorative="false"/>
      <style:paragraph-properties style:writing-mode="lr-tb"/>
    </style:style>
    <style:style style:name="gr14" style:family="graphic" style:parent-style-name="standard">
      <style:graphic-properties draw:fill-color="#d4ea6b" draw:textarea-horizontal-align="justify" draw:textarea-vertical-align="middle" draw:auto-grow-height="false" fo:min-height="0.703cm" fo:min-width="2.358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03cm" fo:min-width="2.358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81aca6" draw:textarea-horizontal-align="justify" draw:textarea-vertical-align="middle" draw:auto-grow-height="false" fo:min-height="0.703cm" fo:min-width="2.358cm" style:writing-mode="lr-tb" loext:decorative="false"/>
      <style:paragraph-properties style:writing-mode="lr-tb"/>
    </style:style>
    <style:style style:name="gr17" style:family="graphic" style:parent-style-name="standard">
      <style:graphic-properties draw:opacity="0%" draw:textarea-horizontal-align="justify" draw:textarea-vertical-align="middle" draw:auto-grow-height="false" fo:min-height="3.878cm" fo:min-width="2.992cm" loext:decorative="false"/>
    </style:style>
    <style:style style:name="gr18" style:family="graphic" style:parent-style-name="standard">
      <style:graphic-properties draw:fill="none" loext:fill-use-slide-background="false" draw:textarea-horizontal-align="justify" draw:textarea-vertical-align="middle" draw:auto-grow-height="false" fo:min-height="7.37cm" fo:min-width="11.882cm" loext:decorative="false"/>
    </style:style>
    <style:style style:name="gr19" style:family="graphic" style:parent-style-name="standard">
      <style:graphic-properties draw:fill-color="#729fcf" draw:opacity="100%" draw:textarea-horizontal-align="justify" draw:textarea-vertical-align="middle" draw:auto-grow-height="false" fo:min-height="2.29cm" fo:min-width="4.263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2.29cm" fo:min-width="4.263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0.703cm" fo:min-width="2.358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294cm" loext:decorative="false"/>
      <style:paragraph-properties style:writing-mode="lr-tb"/>
    </style:style>
    <style:style style:name="gr23" style:family="graphic" style:parent-style-name="standard">
      <style:graphic-properties draw:stroke="dash" draw:stroke-dash="Long_20_Dash" svg:stroke-linecap="butt" draw:opacity="0%" draw:textarea-horizontal-align="justify" draw:textarea-vertical-align="middle" draw:auto-grow-height="false" fo:min-height="7.37cm" fo:min-width="4.898cm" loext:decorative="fals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1aca6"/>
      <style:paragraph-properties fo:text-align="center" style:writing-mode="lr-tb"/>
    </style:style>
    <style:style style:name="P3" style:family="paragraph">
      <loext:graphic-properties draw:fill-color="#d4ea6b"/>
      <style:paragraph-properties fo:text-align="center" style:writing-mode="lr-tb"/>
    </style:style>
    <style:style style:name="P4" style:family="paragraph">
      <loext:graphic-properties draw:fill-color="#d4ea6b" draw:opacity="100%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="none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color="#2a6099" loext:opacity="100%" fo:font-weight="bold" style:font-weight-asian="bold" style:font-weight-complex="bold"/>
    </style:style>
    <style:style style:name="P15" style:family="paragraph">
      <loext:graphic-properties draw:fill="none"/>
      <style:text-properties fo:color="#2a6099" loext:opacity="100%" fo:font-weight="bold" style:font-weight-asian="bold" style:font-weight-complex="bold"/>
    </style:style>
    <style:style style:name="P16" style:family="paragraph">
      <loext:graphic-properties draw:fill-color="#729fcf" draw:opacity="100%"/>
      <style:paragraph-properties fo:text-align="center" style:writing-mode="lr-tb"/>
    </style:style>
    <style:style style:name="P17" style:family="paragraph">
      <style:text-properties fo:font-size="10pt" style:font-size-asian="10pt" style:font-size-complex="10pt"/>
    </style:style>
    <style:style style:name="P18" style:family="paragraph">
      <loext:graphic-properties draw:fill="none"/>
      <style:text-properties fo:font-size="10pt" style:font-size-asian="10pt" style:font-size-complex="10pt"/>
    </style:style>
    <style:style style:name="P19" style:family="paragraph">
      <loext:graphic-properties draw:fill-color="#729fcf"/>
      <style:paragraph-properties fo:text-align="center" style:writing-mode="lr-tb"/>
    </style:style>
    <style:style style:name="P2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63cm" svg:height="2.54cm" svg:x="9.89cm" svg:y="16.557cm">
          <text:p text:style-name="P1">External Sear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4.763cm" svg:height="2.54cm" svg:x="3.222cm" svg:y="7.667cm">
          <text:p text:style-name="P1">Archit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4.763cm" svg:height="2.54cm" svg:x="9.89cm" svg:y="12.112cm">
          <text:p text:style-name="P1">Review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4.763cm" svg:height="2.54cm" svg:x="9.89cm" svg:y="7.667cm">
          <text:p text:style-name="P5">Develop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.763cm" svg:height="2.54cm" svg:x="16.24cm" svg:y="7.667cm">
          <text:p text:style-name="P1">Codebase Explor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7" draw:layer="layout" svg:x1="7.985cm" svg:y1="8.937cm" svg:x2="9.89cm" svg:y2="8.937cm">
          <text:p/>
        </draw:line>
        <draw:frame draw:style-name="gr6" draw:text-style-name="P8" draw:layer="layout" svg:width="3.393cm" svg:height="1.361cm" svg:x="12.53cm" svg:y="10.524cm">
          <draw:text-box>
            <text:p><text:span text:style-name="T1">Review/</text:span><text:span text:style-name="T1">Feedback</text:span></text:p>
          </draw:text-box>
        </draw:frame>
        <draw:line draw:style-name="gr7" draw:text-style-name="P7" draw:layer="layout" svg:x1="12.43cm" svg:y1="12.112cm" svg:x2="12.43cm" svg:y2="10.207cm">
          <text:p/>
        </draw:line>
        <draw:line draw:style-name="gr5" draw:text-style-name="P7" draw:layer="layout" svg:x1="14.653cm" svg:y1="8.937cm" svg:x2="16.24cm" svg:y2="8.937cm">
          <text:p/>
        </draw:line>
        <draw:line draw:style-name="gr7" draw:text-style-name="P7" draw:layer="layout" svg:x1="12.43cm" svg:y1="16.557cm" svg:x2="12.43cm" svg:y2="14.652cm">
          <text:p/>
        </draw:line>
        <draw:connector draw:style-name="gr8" draw:text-style-name="P7" draw:layer="layout" draw:type="lines" draw:line-skew="2.674cm" svg:x1="5.603cm" svg:y1="10.207cm" svg:x2="9.89cm" svg:y2="13.382cm" draw:start-shape="id1" draw:start-glue-point="2" draw:end-shape="id2" draw:end-glue-point="3" svg:d="M5603 10207v3175h3785 502" svg:viewBox="0 0 4288 3176">
          <text:p/>
        </draw:connector>
        <draw:frame draw:style-name="gr6" draw:text-style-name="P8" draw:layer="layout" svg:width="3.492cm" svg:height="1.361cm" svg:x="5.446cm" svg:y="13.608cm">
          <draw:text-box>
            <text:p><text:span text:style-name="T1">Approved</text:span><text:span text:style-name="T1">?</text:span></text:p>
          </draw:text-box>
        </draw:frame>
        <draw:connector draw:style-name="gr8" draw:text-style-name="P7" draw:layer="layout" draw:type="lines" draw:line-skew="0cm 2.674cm" svg:x1="14.653cm" svg:y1="13.382cm" svg:x2="18.621cm" svg:y2="10.207cm" draw:start-shape="id2" draw:start-glue-point="1" draw:end-shape="id3" draw:end-glue-point="2" svg:d="M14653 13382h500 3468v-3175" svg:viewBox="0 0 3969 3176">
          <text:p/>
        </draw:connector>
        <draw:frame draw:style-name="gr6" draw:text-style-name="P8" draw:layer="layout" svg:width="3.393cm" svg:height="1.361cm" svg:x="12.53cm" svg:y="14.969cm">
          <draw:text-box>
            <text:p><text:span text:style-name="T1">Question/</text:span><text:span text:style-name="T1">Answer</text:span></text:p>
          </draw:text-box>
        </draw:frame>
        <draw:frame draw:style-name="gr9" draw:text-style-name="P8" draw:layer="layout" svg:width="3.393cm" svg:height="0.963cm" svg:x="15.387cm" svg:y="13.689cm">
          <draw:text-box>
            <text:p><text:span text:style-name="T1">Find </text:span><text:span text:style-name="T1">context</text:span></text:p>
          </draw:text-box>
        </draw:frame>
        <draw:frame draw:style-name="gr6" draw:text-style-name="P8" draw:layer="layout" svg:width="3.492cm" svg:height="1.361cm" svg:x="7.985cm" svg:y="7.984cm">
          <draw:text-box>
            <text:p><text:span text:style-name="T1">Assign</text:span></text:p>
          </draw:text-box>
        </draw:frame>
        <draw:custom-shape draw:style-name="gr10" draw:text-style-name="P10" xml:id="id5" draw:id="id5" draw:layer="layout" svg:width="2.857cm" svg:height="2.222cm" svg:x="4.493cm" svg:y="3.54cm">
          <text:p text:style-name="P9"><text:span text:style-name="T1">Design doc</text:span></text:p>
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1" draw:text-style-name="P10" draw:layer="layout" svg:width="0.953cm" svg:height="0.953cm" svg:x="6.08cm" svg:y="12.112cm">
          <text:p/>
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1" draw:text-style-name="P10" draw:layer="layout" svg:width="0.953cm" svg:height="0.953cm" svg:x="8.303cm" svg:y="9.254cm">
          <text:p/>
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12" draw:text-style-name="P7" draw:layer="layout" svg:width="2.105cm" svg:height="2.105cm" svg:x="11.478cm" svg:y="21.119cm">
          <draw:image xlink:href="Pictures/100000000000009400000094398B0908.png" xlink:type="simple" xlink:show="embed" xlink:actuate="onLoad" draw:mime-type="image/png">
            <text:p/>
          </draw:image>
        </draw:frame>
        <draw:frame draw:style-name="gr12" draw:text-style-name="P7" xml:id="id4" draw:id="id4" draw:layer="layout" svg:width="2.54cm" svg:height="2.54cm" svg:x="-1.222cm" svg:y="7.667cm">
          <draw:image xlink:href="Pictures/100000000000009400000094784011FC.png" xlink:type="simple" xlink:show="embed" xlink:actuate="onLoad" draw:mime-type="image/png">
            <text:p/>
          </draw:image>
        </draw:frame>
        <draw:line draw:style-name="gr5" draw:text-style-name="P7" draw:layer="layout" svg:x1="12.43cm" svg:y1="19.097cm" svg:x2="12.43cm" svg:y2="21.002cm">
          <text:p/>
        </draw:line>
        <draw:frame draw:style-name="gr13" draw:text-style-name="P11" draw:layer="layout" svg:width="2.483cm" svg:height="1.916cm" svg:x="13.44cm" svg:y="21.308cm">
          <draw:text-box>
            <text:p><text:span text:style-name="T1">Internet/</text:span><text:span text:style-name="T1"><text:line-break/></text:span><text:span text:style-name="T1">Intranet/</text:span><text:span text:style-name="T1"><text:line-break/></text:span><text:span text:style-name="T1">Models</text:span></text:p>
          </draw:text-box>
        </draw:frame>
        <draw:line draw:style-name="gr5" draw:text-style-name="P7" draw:layer="layout" svg:x1="1.318cm" svg:y1="8.937cm" svg:x2="3.223cm" svg:y2="8.937cm">
          <text:p/>
        </draw:line>
        <draw:connector draw:style-name="gr8" draw:text-style-name="P7" draw:layer="layout" draw:type="lines" draw:line-skew="0cm -3.943cm" svg:x1="0.048cm" svg:y1="7.667cm" svg:x2="4.493cm" svg:y2="4.651cm" draw:start-shape="id4" draw:start-glue-point="0" draw:end-shape="id5" svg:d="M48 7667v-500-2516h4445" svg:viewBox="0 0 4446 3017">
          <text:p/>
        </draw:connector>
        <draw:line draw:style-name="gr5" draw:text-style-name="P7" draw:layer="layout" svg:x1="5.763cm" svg:y1="7.667cm" svg:x2="5.763cm" svg:y2="5.762cm">
          <text:p/>
        </draw:line>
        <draw:frame draw:style-name="gr6" draw:text-style-name="P8" draw:layer="layout" svg:width="3.492cm" svg:height="1.361cm" svg:x="5.763cm" svg:y="6.397cm">
          <draw:text-box>
            <text:p><text:span text:style-name="T1">Write</text:span></text:p>
          </draw:text-box>
        </draw:frame>
        <draw:frame draw:style-name="gr6" draw:text-style-name="P8" draw:layer="layout" svg:width="4.445cm" svg:height="1.361cm" svg:x="-0.269cm" svg:y="3.857cm">
          <draw:text-box>
            <text:p><text:span text:style-name="T1">Review &amp; Modify</text:span></text:p>
          </draw:text-box>
        </draw:frame>
        <draw:custom-shape draw:style-name="gr14" draw:text-style-name="P3" draw:layer="layout" svg:width="2.858cm" svg:height="0.953cm" svg:x="3.54cm" svg:y="17.203cm">
          <text:p text:style-name="P1">P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2.858cm" svg:height="0.953cm" svg:x="3.54cm" svg:y="18.473cm">
          <text:p text:style-name="P1">Norm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2.858cm" svg:height="0.953cm" svg:x="3.54cm" svg:y="19.743cm">
          <text:p text:style-name="P1">Fla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3.492cm" svg:height="4.128cm" svg:x="3.223cm" svg:y="1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2.97cm" svg:height="0.963cm" svg:x="3.54cm" svg:y="15.922cm">
          <draw:text-box>
            <text:p text:style-name="P1"><text:span text:style-name="T2">Models</text:span></text:p>
          </draw:text-box>
        </draw:frame>
        <draw:custom-shape draw:style-name="gr18" draw:text-style-name="P7" draw:layer="layout" svg:width="12.382cm" svg:height="7.62cm" svg:x="2.905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5" draw:layer="layout" svg:width="3.393cm" svg:height="0.963cm" svg:x="13.065cm" svg:y="6.397cm">
          <draw:text-box>
            <text:p><text:span text:style-name="T2">Iterate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4.763cm" svg:height="2.54cm" svg:x="16.239cm" svg:y="11.795cm">
          <text:p text:style-name="P1">External Sear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4.763cm" svg:height="2.54cm" svg:x="3.222cm" svg:y="9.89cm">
          <text:p text:style-name="P1">Architect<text:line-break/><text:span text:style-name="T3">2) consolidate feed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xml:id="id7" draw:id="id7" draw:layer="layout" svg:width="4.763cm" svg:height="2.54cm" svg:x="9.891cm" svg:y="12.112cm">
          <text:p text:style-name="P1">Debugger 2<text:line-break/>&amp; Review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8" draw:id="id8" draw:layer="layout" svg:width="4.763cm" svg:height="2.54cm" svg:x="9.891cm" svg:y="7.667cm">
          <text:p text:style-name="P5">Debugger 1<text:line-break/>&amp; Develop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763cm" svg:height="2.54cm" svg:x="16.239cm" svg:y="7.985cm">
          <text:p text:style-name="P1">Codebase Explor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7" draw:layer="layout" svg:x1="14.652cm" svg:y1="8.937cm" svg:x2="15.922cm" svg:y2="8.937cm">
          <text:p/>
        </draw:line>
        <draw:connector draw:style-name="gr8" draw:text-style-name="P7" draw:layer="layout" draw:type="lines" draw:line-skew="0.451cm" svg:x1="5.603cm" svg:y1="12.43cm" svg:x2="9.891cm" svg:y2="13.382cm" draw:start-shape="id6" draw:start-glue-point="2" draw:end-shape="id7" draw:end-glue-point="3" svg:d="M5603 12430v952h3786 502" svg:viewBox="0 0 4289 953">
          <text:p/>
        </draw:connector>
        <draw:frame draw:style-name="gr6" draw:text-style-name="P18" draw:layer="layout" svg:width="3.492cm" svg:height="1.433cm" svg:x="5.447cm" svg:y="13.608cm">
          <draw:text-box>
            <text:p text:style-name="P17"><text:span text:style-name="T3">1) Triage &amp; return root-</text:span><text:span text:style-name="T3">cause-analysis</text:span></text:p>
          </draw:text-box>
        </draw:frame>
        <draw:frame draw:style-name="gr12" draw:text-style-name="P7" draw:layer="layout" svg:width="2.105cm" svg:height="2.105cm" svg:x="16.24cm" svg:y="16.357cm">
          <draw:image xlink:href="Pictures/100000000000009400000094398B0908.png" xlink:type="simple" xlink:show="embed" xlink:actuate="onLoad" draw:mime-type="image/png">
            <text:p/>
          </draw:image>
        </draw:frame>
        <draw:frame draw:style-name="gr12" draw:text-style-name="P7" draw:layer="layout" svg:width="2.54cm" svg:height="2.54cm" svg:x="-1.857cm" svg:y="9.89cm">
          <draw:image xlink:href="Pictures/100000000000009400000094784011FC.png" xlink:type="simple" xlink:show="embed" xlink:actuate="onLoad" draw:mime-type="image/png">
            <text:p/>
          </draw:image>
        </draw:frame>
        <draw:line draw:style-name="gr5" draw:text-style-name="P7" draw:layer="layout" svg:x1="17.192cm" svg:y1="14.335cm" svg:x2="17.192cm" svg:y2="16.24cm">
          <text:p/>
        </draw:line>
        <draw:frame draw:style-name="gr13" draw:text-style-name="P18" draw:layer="layout" svg:width="2.483cm" svg:height="1.916cm" svg:x="18.145cm" svg:y="16.864cm">
          <draw:text-box>
            <text:p text:style-name="P17"><text:span text:style-name="T3">Internet /</text:span><text:span text:style-name="T3"><text:line-break/></text:span><text:span text:style-name="T3">Intranet</text:span></text:p>
          </draw:text-box>
        </draw:frame>
        <draw:line draw:style-name="gr5" draw:text-style-name="P7" draw:layer="layout" svg:x1="0.682cm" svg:y1="11.16cm" svg:x2="3.223cm" svg:y2="11.16cm">
          <text:p/>
        </draw:line>
        <draw:custom-shape draw:style-name="gr14" draw:text-style-name="P3" draw:layer="layout" svg:width="2.858cm" svg:height="0.953cm" svg:x="3.541cm" svg:y="17.203cm">
          <text:p text:style-name="P1">P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layout" svg:width="2.858cm" svg:height="0.953cm" svg:x="3.541cm" svg:y="18.473cm">
          <text:p text:style-name="P1">Norm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2.858cm" svg:height="0.953cm" svg:x="3.541cm" svg:y="19.743cm">
          <text:p text:style-name="P1">Fla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3.492cm" svg:height="4.128cm" svg:x="3.224cm" svg:y="1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2.97cm" svg:height="0.963cm" svg:x="3.541cm" svg:y="15.922cm">
          <draw:text-box>
            <text:p text:style-name="P1"><text:span text:style-name="T2">Models</text:span></text:p>
          </draw:text-box>
        </draw:frame>
        <draw:frame draw:style-name="gr9" draw:text-style-name="P15" draw:layer="layout" svg:width="3.393cm" svg:height="0.963cm" svg:x="13.066cm" svg:y="6.397cm">
          <draw:text-box>
            <text:p><text:span text:style-name="T2">Iterate</text:span></text:p>
          </draw:text-box>
        </draw:frame>
        <draw:frame draw:style-name="gr22" draw:text-style-name="P20" draw:layer="layout" svg:width="4.445cm" svg:height="1.361cm" svg:x="-0.27cm" svg:y="9.799cm">
          <draw:text-box>
            <text:p text:style-name="P1"><text:span text:style-name="T1">Describe</text:span><text:span text:style-name="T1"><text:line-break/></text:span><text:span text:style-name="T1">the issue</text:span></text:p>
          </draw:text-box>
        </draw:frame>
        <draw:connector draw:style-name="gr8" draw:text-style-name="P7" draw:layer="layout" draw:type="lines" draw:line-skew="-0.452cm" svg:x1="5.603cm" svg:y1="9.89cm" svg:x2="9.89cm" svg:y2="8.937cm" draw:start-shape="id6" draw:start-glue-point="0" svg:d="M5603 9890v-953h4287" svg:viewBox="0 0 4288 954">
          <text:p/>
        </draw:connector>
        <draw:frame draw:style-name="gr6" draw:text-style-name="P18" draw:layer="layout" svg:width="3.492cm" svg:height="1.433cm" svg:x="5.445cm" svg:y="7.504cm">
          <draw:text-box>
            <text:p text:style-name="P17"><text:span text:style-name="T3">1) Triage &amp; return </text:span><text:span text:style-name="T3">root-cause-</text:span><text:span text:style-name="T3">analysis</text:span></text:p>
          </draw:text-box>
        </draw:frame>
        <draw:line draw:style-name="gr5" draw:text-style-name="P7" draw:layer="layout" svg:x1="14.652cm" svg:y1="13.382cm" svg:x2="15.922cm" svg:y2="13.382cm">
          <text:p/>
        </draw:line>
        <draw:connector draw:style-name="gr8" draw:text-style-name="P7" draw:layer="layout" draw:type="lines" draw:line-skew="0.135cm -0.769cm" svg:x1="7.985cm" svg:y1="11.16cm" svg:x2="9.891cm" svg:y2="8.937cm" draw:start-shape="id6" draw:start-glue-point="1" draw:end-shape="id8" svg:d="M7985 11160h635v-2223h1271" svg:viewBox="0 0 1907 2224">
          <text:p/>
        </draw:connector>
        <draw:frame draw:style-name="gr6" draw:text-style-name="P18" draw:layer="layout" svg:width="3.492cm" svg:height="1.361cm" svg:x="8.62cm" svg:y="10.207cm">
          <draw:text-box>
            <text:p text:style-name="P17"><text:span text:style-name="T3">3) Fix</text:span></text:p>
          </draw:text-box>
        </draw:frame>
        <draw:line draw:style-name="gr5" draw:text-style-name="P7" draw:layer="layout" svg:x1="11.16cm" svg:y1="10.207cm" svg:x2="11.16cm" svg:y2="12.112cm">
          <text:p/>
        </draw:line>
        <draw:custom-shape draw:style-name="gr23" draw:text-style-name="P13" draw:layer="layout" svg:width="5.398cm" svg:height="7.62cm" svg:x="15.922cm" svg:y="7.35cm">
          <text:p/>
          <draw:enhanced-geometry svg:viewBox="0 0 21600 21600" draw:type="rectangle" draw:enhanced-path="M 0 0 L 21600 0 21600 21600 0 21600 0 0 Z N"/>
        </draw:custom-shape>
        <draw:frame draw:style-name="gr24" draw:text-style-name="P1" draw:layer="layout" svg:width="1.462cm" svg:height="1.462cm" svg:x="16.557cm" svg:y="4.81cm">
          <draw:image xlink:href="Pictures/10000000000000E1000000E1A5C29C1B.png" xlink:type="simple" xlink:show="embed" xlink:actuate="onLoad" draw:mime-type="image/png">
            <text:p/>
          </draw:image>
        </draw:frame>
        <draw:frame draw:style-name="gr24" draw:text-style-name="P1" draw:layer="layout" svg:width="1.78cm" svg:height="1.78cm" svg:x="18.78cm" svg:y="4.617cm">
          <draw:image xlink:href="Pictures/10000000000000E1000000E16E9F18AB.png" xlink:type="simple" xlink:show="embed" xlink:actuate="onLoad" draw:mime-type="image/png">
            <text:p/>
          </draw:image>
        </draw:frame>
        <draw:line draw:style-name="gr5" draw:text-style-name="P7" draw:layer="layout" svg:x1="19.732cm" svg:y1="7.985cm" svg:x2="19.732cm" svg:y2="6.397cm">
          <text:p/>
        </draw:line>
        <draw:line draw:style-name="gr5" draw:text-style-name="P7" draw:layer="layout" svg:x1="17.192cm" svg:y1="7.985cm" svg:x2="17.192cm" svg:y2="6.397cm">
          <text:p/>
        </draw:line>
        <draw:frame draw:style-name="gr25" draw:text-style-name="P11" draw:layer="layout" svg:width="1.692cm" svg:height="1.039cm" svg:x="17.827cm" svg:y="5.041cm">
          <draw:text-box>
            <text:p><text:span text:style-name="T3">Git / RAG</text:span></text:p>
          </draw:text-box>
        </draw:frame>
        <draw:frame draw:style-name="gr24" draw:text-style-name="P1" draw:layer="layout" svg:width="1.259cm" svg:height="0.912cm" svg:x="12.123cm" svg:y="11.16cm">
          <draw:image xlink:href="Pictures/10000000000000E1000000E1D0F18F78.png" xlink:type="simple" xlink:show="embed" xlink:actuate="onLoad" draw:mime-type="image/png">
            <text:p/>
          </draw:image>
        </draw:frame>
        <draw:frame draw:style-name="gr6" draw:text-style-name="P18" draw:layer="layout" svg:width="3.393cm" svg:height="1.361cm" svg:x="11.577cm" svg:y="10.434cm">
          <draw:text-box>
            <text:p text:style-name="P17"><text:span text:style-name="T3">4) Review and give </text:span><text:span text:style-name="T3">feedback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31T18:59:30.796924775</meta:creation-date>
    <dc:date>2026-06-09T15:29:34.441940727</dc:date>
    <meta:editing-duration>P1DT10H37M1S</meta:editing-duration>
    <meta:editing-cycles>4</meta:editing-cycles>
    <meta:generator>LibreOffice/24.2.7.2$Linux_X86_64 LibreOffice_project/420$Build-2</meta:generator>
    <meta:document-statistic meta:object-count="69"/>
  </office:meta>
</office:document-meta>
</file>